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8a6" officeooo:paragraph-rsid="00115b86"/>
    </style:style>
    <style:style style:name="P2" style:family="paragraph" style:parent-style-name="Standard">
      <style:text-properties style:text-underline-style="solid" style:text-underline-width="auto" style:text-underline-color="font-color" officeooo:rsid="0013bb7c" officeooo:paragraph-rsid="00115b86"/>
    </style:style>
    <style:style style:name="P3" style:family="paragraph" style:parent-style-name="Standard">
      <style:text-properties style:text-underline-style="none" officeooo:rsid="0013bb7c" officeooo:paragraph-rsid="0013bb7c"/>
    </style:style>
    <style:style style:name="P4" style:family="paragraph" style:parent-style-name="Standard">
      <style:text-properties style:text-underline-style="none" officeooo:rsid="001475c3" officeooo:paragraph-rsid="001475c3"/>
    </style:style>
    <style:style style:name="P5" style:family="paragraph" style:parent-style-name="Standard">
      <style:text-properties style:text-underline-style="none" officeooo:rsid="00162b63" officeooo:paragraph-rsid="00162b63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7c37d" officeooo:paragraph-rsid="0017c37d" style:font-weight-asian="bold" style:font-weight-complex="bold"/>
    </style:style>
    <style:style style:name="P7" style:family="paragraph" style:parent-style-name="Standard">
      <style:text-properties officeooo:rsid="0018802e" officeooo:paragraph-rsid="0018802e"/>
    </style:style>
    <style:style style:name="P8" style:family="paragraph" style:parent-style-name="Standard">
      <style:text-properties officeooo:rsid="001a7a7f" officeooo:paragraph-rsid="001a7a7f"/>
    </style:style>
    <style:style style:name="T1" style:family="text">
      <style:text-properties officeooo:rsid="00115b86"/>
    </style:style>
    <style:style style:name="T2" style:family="text">
      <style:text-properties officeooo:rsid="00125ecc"/>
    </style:style>
    <style:style style:name="T3" style:family="text">
      <style:text-properties officeooo:rsid="0012b107"/>
    </style:style>
    <style:style style:name="T4" style:family="text">
      <style:text-properties officeooo:rsid="0013f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EX(Internship Explorer)</text:p>
      <text:p text:style-name="P1"/>
      <text:p text:style-name="P7">Install node.js</text:p>
      <text:p text:style-name="P7">Install Next.js </text:p>
      <text:p text:style-name="P7">Install supabase dependencies</text:p>
      <text:p text:style-name="P8">Install leaflet dependencies</text:p>
      <text:p text:style-name="P7"/>
      <text:p text:style-name="P1">SO far, using leaflet API, I have been able to establish a <text:span text:style-name="T1">map functionality, </text:span></text:p>
      <text:p text:style-name="P1"><text:span text:style-name="T1">which prompts the user to accept the sharing of </text:span><text:span text:style-name="T2">his/her location, this allows the platform to form a radius of 5km, around the user, </text:span><text:span text:style-name="T3">which would identify companies around that user.</text:span></text:p>
      <text:p text:style-name="P2"/>
      <text:p text:style-name="P3">Using supabase SQL editor, I was able to <text:span text:style-name="T4">create a query, which stored 2 companies, Maviance and MTN Cameroon, under the technology option.</text:span></text:p>
      <text:p text:style-name="P4">The user gets welcomed with these companies once the explorer page is accessed. </text:p>
      <text:p text:style-name="P5">What I think is left is to establish the wishlist page, for bookmarking the companies,</text:p>
      <text:p text:style-name="P5">Adding more companies to the database, so they can be seen by the user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0T16:28:36.262025088</meta:creation-date>
    <meta:generator>LibreOffice/7.3.7.2$Linux_X86_64 LibreOffice_project/30$Build-2</meta:generator>
    <dc:date>2026-05-10T16:37:23.021450648</dc:date>
    <meta:editing-duration>PT8M42S</meta:editing-duration>
    <meta:editing-cycles>11</meta:editing-cycles>
    <meta:document-statistic meta:table-count="0" meta:image-count="0" meta:object-count="0" meta:page-count="1" meta:paragraph-count="11" meta:word-count="122" meta:character-count="747" meta:non-whitespace-character-count="633"/>
  </office:meta>
</office:document-meta>
</file>